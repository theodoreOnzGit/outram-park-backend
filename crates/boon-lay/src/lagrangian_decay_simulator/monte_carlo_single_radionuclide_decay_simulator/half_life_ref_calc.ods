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n/n0</text:p>
          </table:table-cell>
          <table:table-cell/>
          <table:table-cell office:value-type="string" calcext:value-type="string">
            <text:p>half life seconds</text:p>
          </table:table-cell>
          <table:table-cell office:value-type="string" calcext:value-type="string">
            <text:p>lambd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EXP(-[.A3]*[.$E$3])"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formula="of:=LN(2)/[.D3]" office:value-type="float" office:value="0.0231049060186648" calcext:value-type="float">
            <text:p>0.02310490601866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EXP(-[.A4]*[.$E$3])" office:value-type="float" office:value="0.977159968434246" calcext:value-type="float">
            <text:p>0.97715996843424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EXP(-[.A5]*[.$E$3])" office:value-type="float" office:value="0.954841603910417" calcext:value-type="float">
            <text:p>0.95484160391041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EXP(-[.A6]*[.$E$3])" office:value-type="float" office:value="0.933032991536807" calcext:value-type="float">
            <text:p>0.93303299153680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EXP(-[.A7]*[.$E$3])" office:value-type="float" office:value="0.911722488558217" calcext:value-type="float">
            <text:p>0.91172248855821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EXP(-[.A8]*[.$E$3])" office:value-type="float" office:value="0.890898718140339" calcext:value-type="float">
            <text:p>0.89089871814033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EXP(-[.A9]*[.$E$3])" office:value-type="float" office:value="0.870550563296124" calcext:value-type="float">
            <text:p>0.87055056329612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EXP(-[.A10]*[.$E$3])" office:value-type="float" office:value="0.850667160950856" calcext:value-type="float">
            <text:p>0.85066716095085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EXP(-[.A11]*[.$E$3])" office:value-type="float" office:value="0.831237896142788" calcext:value-type="float">
            <text:p>0.83123789614278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EXP(-[.A12]*[.$E$3])" office:value-type="float" office:value="0.812252396356236" calcext:value-type="float">
            <text:p>0.81225239635623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EXP(-[.A13]*[.$E$3])" office:value-type="float" office:value="0.7937005259841" calcext:value-type="float">
            <text:p>0.793700525984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EXP(-[.A14]*[.$E$3])" office:value-type="float" office:value="0.775572380916867" calcext:value-type="float">
            <text:p>0.775572380916867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EXP(-[.A15]*[.$E$3])" office:value-type="float" office:value="0.757858283255199" calcext:value-type="float">
            <text:p>0.757858283255199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EXP(-[.A16]*[.$E$3])" office:value-type="float" office:value="0.740548776143282" calcext:value-type="float">
            <text:p>0.74054877614328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EXP(-[.A17]*[.$E$3])" office:value-type="float" office:value="0.723634618720189" calcext:value-type="float">
            <text:p>0.723634618720189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EXP(-[.A18]*[.$E$3])" office:value-type="float" office:value="0.707106781186548" calcext:value-type="float">
            <text:p>0.707106781186548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EXP(-[.A19]*[.$E$3])" office:value-type="float" office:value="0.690956439983888" calcext:value-type="float">
            <text:p>0.690956439983888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EXP(-[.A20]*[.$E$3])" office:value-type="float" office:value="0.675174973084095" calcext:value-type="float">
            <text:p>0.675174973084095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EXP(-[.A21]*[.$E$3])" office:value-type="float" office:value="0.659753955386447" calcext:value-type="float">
            <text:p>0.659753955386447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EXP(-[.A22]*[.$E$3])" office:value-type="float" office:value="0.64468515421979" calcext:value-type="float">
            <text:p>0.64468515421979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EXP(-[.A23]*[.$E$3])" office:value-type="float" office:value="0.629960524947437" calcext:value-type="float">
            <text:p>0.629960524947437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EXP(-[.A24]*[.$E$3])" office:value-type="float" office:value="0.615572206672458" calcext:value-type="float">
            <text:p>0.615572206672458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EXP(-[.A25]*[.$E$3])" office:value-type="float" office:value="0.601512518041058" calcext:value-type="float">
            <text:p>0.601512518041058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EXP(-[.A26]*[.$E$3])" office:value-type="float" office:value="0.587773953141804" calcext:value-type="float">
            <text:p>0.58777395314180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EXP(-[.A27]*[.$E$3])" office:value-type="float" office:value="0.574349177498518" calcext:value-type="float">
            <text:p>0.574349177498518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EXP(-[.A28]*[.$E$3])" office:value-type="float" office:value="0.561231024154687" calcext:value-type="float">
            <text:p>0.561231024154687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EXP(-[.A29]*[.$E$3])" office:value-type="float" office:value="0.548412489847313" calcext:value-type="float">
            <text:p>0.548412489847313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EXP(-[.A30]*[.$E$3])" office:value-type="float" office:value="0.535886731268147" calcext:value-type="float">
            <text:p>0.535886731268147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EXP(-[.A31]*[.$E$3])" office:value-type="float" office:value="0.523647061410313" calcext:value-type="float">
            <text:p>0.523647061410313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EXP(-[.A32]*[.$E$3])" office:value-type="float" office:value="0.511686945998388" calcext:value-type="float">
            <text:p>0.511686945998388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EXP(-[.A33]*[.$E$3])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EXP(-[.A34]*[.$E$3])" office:value-type="float" office:value="0.488579984217123" calcext:value-type="float">
            <text:p>0.488579984217123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EXP(-[.A35]*[.$E$3])" office:value-type="float" office:value="0.477420801955208" calcext:value-type="float">
            <text:p>0.477420801955208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EXP(-[.A36]*[.$E$3])" office:value-type="float" office:value="0.466516495768404" calcext:value-type="float">
            <text:p>0.466516495768404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EXP(-[.A37]*[.$E$3])" office:value-type="float" office:value="0.455861244279108" calcext:value-type="float">
            <text:p>0.455861244279108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EXP(-[.A38]*[.$E$3])" office:value-type="float" office:value="0.44544935907017" calcext:value-type="float">
            <text:p>0.44544935907017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EXP(-[.A39]*[.$E$3])" office:value-type="float" office:value="0.435275281648062" calcext:value-type="float">
            <text:p>0.435275281648062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EXP(-[.A40]*[.$E$3])" office:value-type="float" office:value="0.425333580475428" calcext:value-type="float">
            <text:p>0.42533358047542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EXP(-[.A41]*[.$E$3])" office:value-type="float" office:value="0.415618948071394" calcext:value-type="float">
            <text:p>0.415618948071394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EXP(-[.A42]*[.$E$3])" office:value-type="float" office:value="0.406126198178118" calcext:value-type="float">
            <text:p>0.406126198178118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EXP(-[.A43]*[.$E$3])" office:value-type="float" office:value="0.39685026299205" calcext:value-type="float">
            <text:p>0.39685026299205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EXP(-[.A44]*[.$E$3])" office:value-type="float" office:value="0.387786190458434" calcext:value-type="float">
            <text:p>0.387786190458434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EXP(-[.A45]*[.$E$3])" office:value-type="float" office:value="0.3789291416276" calcext:value-type="float">
            <text:p>0.3789291416276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EXP(-[.A46]*[.$E$3])" office:value-type="float" office:value="0.370274388071641" calcext:value-type="float">
            <text:p>0.370274388071641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EXP(-[.A47]*[.$E$3])" office:value-type="float" office:value="0.361817309360095" calcext:value-type="float">
            <text:p>0.36181730936009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EXP(-[.A48]*[.$E$3])" office:value-type="float" office:value="0.353553390593274" calcext:value-type="float">
            <text:p>0.353553390593274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EXP(-[.A49]*[.$E$3])" office:value-type="float" office:value="0.345478219991944" calcext:value-type="float">
            <text:p>0.345478219991944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EXP(-[.A50]*[.$E$3])" office:value-type="float" office:value="0.337587486542048" calcext:value-type="float">
            <text:p>0.33758748654204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EXP(-[.A51]*[.$E$3])" office:value-type="float" office:value="0.329876977693224" calcext:value-type="float">
            <text:p>0.329876977693224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EXP(-[.A52]*[.$E$3])" office:value-type="float" office:value="0.322342577109895" calcext:value-type="float">
            <text:p>0.32234257710989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EXP(-[.A53]*[.$E$3])" office:value-type="float" office:value="0.314980262473718" calcext:value-type="float">
            <text:p>0.314980262473718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EXP(-[.A54]*[.$E$3])" office:value-type="float" office:value="0.307786103336229" calcext:value-type="float">
            <text:p>0.307786103336229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EXP(-[.A55]*[.$E$3])" office:value-type="float" office:value="0.300756259020529" calcext:value-type="float">
            <text:p>0.300756259020529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EXP(-[.A56]*[.$E$3])" office:value-type="float" office:value="0.293886976570902" calcext:value-type="float">
            <text:p>0.293886976570902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EXP(-[.A57]*[.$E$3])" office:value-type="float" office:value="0.287174588749259" calcext:value-type="float">
            <text:p>0.287174588749259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EXP(-[.A58]*[.$E$3])" office:value-type="float" office:value="0.280615512077343" calcext:value-type="float">
            <text:p>0.280615512077343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EXP(-[.A59]*[.$E$3])" office:value-type="float" office:value="0.274206244923657" calcext:value-type="float">
            <text:p>0.274206244923657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EXP(-[.A60]*[.$E$3])" office:value-type="float" office:value="0.267943365634073" calcext:value-type="float">
            <text:p>0.267943365634073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EXP(-[.A61]*[.$E$3])" office:value-type="float" office:value="0.261823530705157" calcext:value-type="float">
            <text:p>0.261823530705157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EXP(-[.A62]*[.$E$3])" office:value-type="float" office:value="0.255843472999194" calcext:value-type="float">
            <text:p>0.255843472999194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EXP(-[.A63]*[.$E$3])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EXP(-[.A64]*[.$E$3])" office:value-type="float" office:value="0.244289992108562" calcext:value-type="float">
            <text:p>0.244289992108562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EXP(-[.A65]*[.$E$3])" office:value-type="float" office:value="0.238710400977604" calcext:value-type="float">
            <text:p>0.238710400977604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EXP(-[.A66]*[.$E$3])" office:value-type="float" office:value="0.233258247884202" calcext:value-type="float">
            <text:p>0.233258247884202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EXP(-[.A67]*[.$E$3])" office:value-type="float" office:value="0.227930622139554" calcext:value-type="float">
            <text:p>0.227930622139554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EXP(-[.A68]*[.$E$3])" office:value-type="float" office:value="0.222724679535085" calcext:value-type="float">
            <text:p>0.222724679535085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EXP(-[.A69]*[.$E$3])" office:value-type="float" office:value="0.217637640824031" calcext:value-type="float">
            <text:p>0.217637640824031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EXP(-[.A70]*[.$E$3])" office:value-type="float" office:value="0.212666790237714" calcext:value-type="float">
            <text:p>0.212666790237714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EXP(-[.A71]*[.$E$3])" office:value-type="float" office:value="0.207809474035697" calcext:value-type="float">
            <text:p>0.207809474035697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EXP(-[.A72]*[.$E$3])" office:value-type="float" office:value="0.203063099089059" calcext:value-type="float">
            <text:p>0.203063099089059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EXP(-[.A73]*[.$E$3])" office:value-type="float" office:value="0.198425131496025" calcext:value-type="float">
            <text:p>0.198425131496025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EXP(-[.A74]*[.$E$3])" office:value-type="float" office:value="0.193893095229217" calcext:value-type="float">
            <text:p>0.193893095229217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EXP(-[.A75]*[.$E$3])" office:value-type="float" office:value="0.1894645708138" calcext:value-type="float">
            <text:p>0.1894645708138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EXP(-[.A76]*[.$E$3])" office:value-type="float" office:value="0.185137194035821" calcext:value-type="float">
            <text:p>0.185137194035821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EXP(-[.A77]*[.$E$3])" office:value-type="float" office:value="0.180908654680047" calcext:value-type="float">
            <text:p>0.180908654680047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EXP(-[.A78]*[.$E$3])" office:value-type="float" office:value="0.176776695296637" calcext:value-type="float">
            <text:p>0.176776695296637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EXP(-[.A79]*[.$E$3])" office:value-type="float" office:value="0.172739109995972" calcext:value-type="float">
            <text:p>0.172739109995972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EXP(-[.A80]*[.$E$3])" office:value-type="float" office:value="0.168793743271024" calcext:value-type="float">
            <text:p>0.168793743271024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EXP(-[.A81]*[.$E$3])" office:value-type="float" office:value="0.164938488846612" calcext:value-type="float">
            <text:p>0.164938488846612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EXP(-[.A82]*[.$E$3])" office:value-type="float" office:value="0.161171288554947" calcext:value-type="float">
            <text:p>0.161171288554947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EXP(-[.A83]*[.$E$3])" office:value-type="float" office:value="0.157490131236859" calcext:value-type="float">
            <text:p>0.157490131236859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EXP(-[.A84]*[.$E$3])" office:value-type="float" office:value="0.153893051668115" calcext:value-type="float">
            <text:p>0.153893051668115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EXP(-[.A85]*[.$E$3])" office:value-type="float" office:value="0.150378129510265" calcext:value-type="float">
            <text:p>0.150378129510265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EXP(-[.A86]*[.$E$3])" office:value-type="float" office:value="0.146943488285451" calcext:value-type="float">
            <text:p>0.146943488285451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EXP(-[.A87]*[.$E$3])" office:value-type="float" office:value="0.143587294374629" calcext:value-type="float">
            <text:p>0.143587294374629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EXP(-[.A88]*[.$E$3])" office:value-type="float" office:value="0.140307756038672" calcext:value-type="float">
            <text:p>0.140307756038672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EXP(-[.A89]*[.$E$3])" office:value-type="float" office:value="0.137103122461828" calcext:value-type="float">
            <text:p>0.137103122461828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EXP(-[.A90]*[.$E$3])" office:value-type="float" office:value="0.133971682817037" calcext:value-type="float">
            <text:p>0.133971682817037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EXP(-[.A91]*[.$E$3])" office:value-type="float" office:value="0.130911765352578" calcext:value-type="float">
            <text:p>0.130911765352578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EXP(-[.A92]*[.$E$3])" office:value-type="float" office:value="0.127921736499597" calcext:value-type="float">
            <text:p>0.127921736499597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EXP(-[.A93]*[.$E$3])" office:value-type="float" office:value="0.125" calcext:value-type="float">
            <text:p>0.125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EXP(-[.A94]*[.$E$3])" office:value-type="float" office:value="0.122144996054281" calcext:value-type="float">
            <text:p>0.122144996054281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EXP(-[.A95]*[.$E$3])" office:value-type="float" office:value="0.119355200488802" calcext:value-type="float">
            <text:p>0.119355200488802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EXP(-[.A96]*[.$E$3])" office:value-type="float" office:value="0.116629123942101" calcext:value-type="float">
            <text:p>0.116629123942101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EXP(-[.A97]*[.$E$3])" office:value-type="float" office:value="0.113965311069777" calcext:value-type="float">
            <text:p>0.113965311069777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EXP(-[.A98]*[.$E$3])" office:value-type="float" office:value="0.111362339767542" calcext:value-type="float">
            <text:p>0.111362339767542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EXP(-[.A99]*[.$E$3])" office:value-type="float" office:value="0.108818820412016" calcext:value-type="float">
            <text:p>0.108818820412016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EXP(-[.A100]*[.$E$3])" office:value-type="float" office:value="0.106333395118857" calcext:value-type="float">
            <text:p>0.106333395118857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EXP(-[.A101]*[.$E$3])" office:value-type="float" office:value="0.103904737017849" calcext:value-type="float">
            <text:p>0.103904737017849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EXP(-[.A102]*[.$E$3])" office:value-type="float" office:value="0.101531549544529" calcext:value-type="float">
            <text:p>0.101531549544529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EXP(-[.A103]*[.$E$3])" office:value-type="float" office:value="0.0992125657480125" calcext:value-type="float">
            <text:p>0.0992125657480125</text:p>
          </table:table-cell>
          <table:table-cell table:number-columns-repeated="3"/>
        </table:table-row>
      </table:table>
      <table:table table:name="th232 decay chai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For the stochastic test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uclide</text:p>
          </table:table-cell>
          <table:table-cell office:value-type="string" calcext:value-type="string">
            <text:p>time to decay(s)</text:p>
          </table:table-cell>
          <table:table-cell office:value-type="string" calcext:value-type="string">
            <text:p>time to decay (yrs)</text:p>
          </table:table-cell>
          <table:table-cell office:value-type="string" calcext:value-type="string">
            <text:p>time to decay (mths)</text:p>
          </table:table-cell>
        </table:table-row>
        <table:table-row table:style-name="ro1">
          <table:table-cell/>
          <table:table-cell office:value-type="string" calcext:value-type="string">
            <text:p>Ra2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2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h2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224</text:p>
          </table:table-cell>
          <table:table-cell office:value-type="float" office:value="316224" calcext:value-type="float">
            <text:p>316224</text:p>
          </table:table-cell>
          <table:table-cell table:formula="of:=[.C6]/365.25/24/3600" office:value-type="float" office:value="0.0100205338809035" calcext:value-type="float">
            <text:p>0.0100205338809035</text:p>
          </table:table-cell>
          <table:table-cell table:formula="of:=[.D6]*12" office:value-type="float" office:value="0.120246406570842" calcext:value-type="float">
            <text:p>0.120246406570842</text:p>
          </table:table-cell>
        </table:table-row>
        <table:table-row table:style-name="ro1">
          <table:table-cell/>
          <table:table-cell office:value-type="string" calcext:value-type="string">
            <text:p>Rn220</text:p>
          </table:table-cell>
          <table:table-cell office:value-type="float" office:value="0.243" calcext:value-type="float">
            <text:p>0.243</text:p>
          </table:table-cell>
          <table:table-cell table:formula="of:=[.C7]/365.25/24/3600" office:value-type="float" office:value="0.00000000770020533880904" calcext:value-type="float">
            <text:p>7.70020533880904E-09</text:p>
          </table:table-cell>
          <table:table-cell table:formula="of:=[.D7]*12" office:value-type="float" office:value="0.0000000924024640657084" calcext:value-type="float">
            <text:p>9.24024640657084E-08</text:p>
          </table:table-cell>
        </table:table-row>
        <table:table-row table:style-name="ro1">
          <table:table-cell/>
          <table:table-cell office:value-type="string" calcext:value-type="string">
            <text:p>Po216</text:p>
          </table:table-cell>
          <table:table-cell office:value-type="float" office:value="9132.88" calcext:value-type="float">
            <text:p>9132.88</text:p>
          </table:table-cell>
          <table:table-cell table:formula="of:=[.C8]/365.25/24/3600" office:value-type="float" office:value="0.000289403503434989" calcext:value-type="float">
            <text:p>0.000289403503434989</text:p>
          </table:table-cell>
          <table:table-cell table:formula="of:=[.D8]*12" office:value-type="float" office:value="0.00347284204121986" calcext:value-type="float">
            <text:p>0.00347284204121986</text:p>
          </table:table-cell>
        </table:table-row>
        <table:table-row table:style-name="ro1">
          <table:table-cell/>
          <table:table-cell office:value-type="string" calcext:value-type="string">
            <text:p>Pb212</text:p>
          </table:table-cell>
          <table:table-cell office:value-type="float" office:value="3667.71" calcext:value-type="float">
            <text:p>3667.71</text:p>
          </table:table-cell>
          <table:table-cell table:formula="of:=[.C9]/365.25/24/3600" office:value-type="float" office:value="0.000116222716556392" calcext:value-type="float">
            <text:p>0.000116222716556392</text:p>
          </table:table-cell>
          <table:table-cell table:formula="of:=[.D9]*12" office:value-type="float" office:value="0.00139467259867671" calcext:value-type="float">
            <text:p>0.00139467259867671</text:p>
          </table:table-cell>
        </table:table-row>
        <table:table-row table:style-name="ro1">
          <table:table-cell table:number-columns-repeated="2"/>
          <table:table-cell table:formula="of:=SUM([.C3:.C9])" office:value-type="float" office:value="329024.833" calcext:value-type="float">
            <text:p>329024.833</text:p>
          </table:table-cell>
          <table:table-cell table:formula="of:=SUM([.D3:.D8])" office:value-type="float" office:value="0.0103099450845438" calcext:value-type="float">
            <text:p>0.0103099450845438</text:p>
          </table:table-cell>
          <table:table-cell table:formula="of:=SUM([.E3:.E9])" office:value-type="float" office:value="0.125114013613203" calcext:value-type="float">
            <text:p>0.12511401361320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time to lead 212</text:p>
          </table:table-cell>
          <table:table-cell table:formula="of:=SUM([.C6:.C8])+[.C9]/2" office:value-type="float" office:value="327190.978" calcext:value-type="float">
            <text:p>327190.978</text:p>
          </table:table-cell>
          <table:table-cell table:number-columns-repeated="2"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2"/>
          <table:table-cell office:value-type="float" office:value="327190.978" calcext:value-type="float">
            <text:p>327190.978</text:p>
          </table:table-cell>
          <table:table-cell office:value-type="float" office:value="12.861851717019" calcext:value-type="float">
            <text:p>12.86185171701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Zen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1">00/00/0000</text:date>, <text:time style:data-style-name="N2" text:time-value="15:48:51.1612100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1T12:01:25.292481507</meta:creation-date>
    <dc:date>2026-01-21T16:08:14.289095353</dc:date>
    <meta:editing-duration>PT9M34S</meta:editing-duration>
    <meta:editing-cycles>5</meta:editing-cycles>
    <meta:generator>LibreOffice/25.8.4.2$Linux_X86_64 LibreOffice_project/580$Build-2</meta:generator>
    <meta:document-statistic meta:table-count="2" meta:cell-count="239" meta:object-count="0"/>
  </office:meta>
</office:document-meta>
</file>